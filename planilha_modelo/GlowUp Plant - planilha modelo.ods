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4.76pt"/>
    </style:style>
    <style:style style:name="co2" style:family="table-column">
      <style:table-column-properties fo:break-before="auto" style:column-width="141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63.9pt"/>
    </style:style>
    <style:style style:name="co5" style:family="table-column">
      <style:table-column-properties fo:break-before="auto" style:column-width="205.54pt"/>
    </style:style>
    <style:style style:name="co6" style:family="table-column">
      <style:table-column-properties fo:break-before="auto" style:column-width="99.35pt"/>
    </style:style>
    <style:style style:name="co7" style:family="table-column">
      <style:table-column-properties fo:break-before="auto" style:column-width="272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dos">
      <style:table-properties table:display="true" style:writing-mode="lr-tb"/>
    </style:style>
    <style:style style:name="ta2" style:family="table" style:master-page-name="PageStyle_5f_Resumo">
      <style:table-properties table:display="true" style:writing-mode="lr-tb"/>
    </style:style>
    <style:style style:name="ta3" style:family="table" style:master-page-name="PageStyle_5f_Dashboard">
      <style:table-properties table:display="true" style:writing-mode="lr-tb"/>
    </style:style>
    <style:style style:name="ta4" style:family="table" style:master-page-name="PageStyle_5f_Diagnóstico">
      <style:table-properties table:display="true" style:writing-mode="lr-tb"/>
    </style:style>
    <style:style style:name="ta5" style:family="table" style:master-page-name="PageStyle_5f_DiagnósticoIA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5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Data e Hora</text:p>
          </table:table-cell>
          <table:table-cell table:style-name="ce1" office:value-type="string" calcext:value-type="string">
            <text:p>Umidade (%)</text:p>
          </table:table-cell>
          <table:table-cell table:style-name="ce1" office:value-type="string" calcext:value-type="string">
            <text:p>Leitura ADC</text:p>
          </table:table-cell>
          <table:table-cell table:style-name="ce1" office:value-type="string" calcext:value-type="string">
            <text:p>Estado</text:p>
          </table:table-cell>
          <table:table-cell table:style-name="ce3" office:value-type="string" calcext:value-type="string">
            <text:p>Plant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6-08T08:00:00" calcext:value-type="date">
            <text:p>2026-06-08 08:00:0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office:value-type="string" calcext:value-type="string">
            <text:p>Úmido</text:p>
          </table:table-cell>
          <table:table-cell table:style-name="ce3" office:value-type="string" calcext:value-type="string">
            <text:p>Jibói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6-08T09:00:00" calcext:value-type="date">
            <text:p>2026-06-08 09:00:0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50" calcext:value-type="float">
            <text:p>2350</text:p>
          </table:table-cell>
          <table:table-cell table:style-name="ce3" office:value-type="string" calcext:value-type="string">
            <text:p>Úmido</text:p>
          </table:table-cell>
          <table:table-cell table:style-name="ce3" office:value-type="string" calcext:value-type="string">
            <text:p>Jibói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6-08T10:00:00" calcext:value-type="date">
            <text:p>2026-06-08 10:00:0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string" calcext:value-type="string">
            <text:p>Atenção</text:p>
          </table:table-cell>
          <table:table-cell table:style-name="ce3" office:value-type="string" calcext:value-type="string">
            <text:p>Jibói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6-08T11:00:00" calcext:value-type="date">
            <text:p>2026-06-08 11:00:0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00" calcext:value-type="float">
            <text:p>3100</text:p>
          </table:table-cell>
          <table:table-cell table:style-name="ce3" office:value-type="string" calcext:value-type="string">
            <text:p>Seco</text:p>
          </table:table-cell>
          <table:table-cell table:style-name="ce3" office:value-type="string" calcext:value-type="string">
            <text:p>Jibóia</text:p>
          </table:table-cell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mo" table:style-name="ta2">
        <table:table-column table:style-name="co4" table:default-cell-style-name="Default"/>
        <table:table-column table:style-name="co5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style-name="ce4" office:value-type="string" calcext:value-type="string">
            <text:p>Planta</text:p>
          </table:table-cell>
          <table:table-cell table:style-name="ce6" table:formula="of:=[$Dados.E2]" office:value-type="string" office:string-value="Jibóia" calcext:value-type="string">
            <text:p>Jibóia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Última leitura</text:p>
          </table:table-cell>
          <table:table-cell table:style-name="ce7" table:formula="of:=MAX([$Dados.A2:.A1000])" office:value-type="date" office:date-value="2026-06-08T10:59:59.712" calcext:value-type="date">
            <text:p>6/8/2026 11:00:0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Umidade atual (%)</text:p>
          </table:table-cell>
          <table:table-cell table:style-name="ce6" table:number-matrix-columns-spanned="1" table:number-matrix-rows-spanned="1" table:formula="of:=INDEX([$Dados.B2:.B1000];MATCH([.B3];[$Dados.A2:.A1000];0)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stado atual</text:p>
          </table:table-cell>
          <table:table-cell table:style-name="ce6" table:number-matrix-columns-spanned="1" table:number-matrix-rows-spanned="1" table:formula="of:=INDEX([$Dados.D2:.D1000];MATCH([.B3];[$Dados.A2:.A1000];0)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édia últimas 12h (%)</text:p>
          </table:table-cell>
          <table:table-cell table:style-name="ce6" table:formula="of:=IFERROR(__xludf.dummyfunction(&quot;IFERROR(AVERAGE(FILTER(Dados!B2:B1000,Dados!A2:A1000&gt;=NOW()-12/24,Dados!B2:B1000&gt;0)),&quot;&quot;Sem dados&quot;&quot;)&quot;);37.5)" office:value-type="float" office:value="37.5" calcext:value-type="float">
            <text:p>37.5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édia últimas 24h (%)</text:p>
          </table:table-cell>
          <table:table-cell table:style-name="ce6" table:formula="of:=IFERROR(__xludf.dummyfunction(&quot;IFERROR(AVERAGE(FILTER(Dados!B2:B1000,Dados!A2:A1000&gt;=NOW()-1,Dados!B2:B1000&gt;0)),&quot;&quot;Sem dados&quot;&quot;)&quot;);37.5)" office:value-type="float" office:value="37.5" calcext:value-type="float">
            <text:p>37.5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enor umidade 24h (%)</text:p>
          </table:table-cell>
          <table:table-cell table:style-name="ce6" table:formula="of:=IFERROR(__xludf.dummyfunction(&quot;MIN(FILTER(Dados!B2:B1000,Dados!A2:A1000&gt;=NOW()-1,Dados!B2:B1000&gt;0))&quot;);28)"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aior umidade 24h (%)</text:p>
          </table:table-cell>
          <table:table-cell table:style-name="ce6" table:formula="of:=IFERROR(__xludf.dummyfunction(&quot;IFERROR(MAX(FILTER(Dados!B2:B1000,Dados!A2:A1000&gt;=NOW()-1,Dados!B2:B1000&gt;0)),&quot;&quot;Sem dados&quot;&quot;)&quot;);45)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eituras últimas 24h</text:p>
          </table:table-cell>
          <table:table-cell table:style-name="ce6" table:formula="of:=COUNTIFS([$Dados.A2:.A1000];&quot;&gt;=&quot;&amp;NOW()-1;[$Dados.B2:.B1000];&quot;&gt;0&quot;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eituras críticas 24h</text:p>
          </table:table-cell>
          <table:table-cell table:style-name="ce6" table:formula="of:=COUNTIFS([$Dados.A2:.A1000];&quot;&gt;=&quot;&amp;NOW()-1;[$Dados.B2:.B1000];&quot;&gt;0&quot;;[$Dados.B2:.B1000];&quot;&lt;=20&quot;)+COUNTIFS([$Dados.A2:.A1000];&quot;&gt;=&quot;&amp;NOW()-1;[$Dados.B2:.B1000];&quot;&gt;=90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ercentual crítico 24h (%)</text:p>
          </table:table-cell>
          <table:table-cell table:style-name="ce6" table:formula="of:=IFERROR(100*[.B11]/[.B10];0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édia diária hoje (%)</text:p>
          </table:table-cell>
          <table:table-cell table:style-name="ce6" table:formula="of:=IFERROR(__xludf.dummyfunction(&quot;IFERROR(AVERAGE(FILTER(Dados!B2:B1000,Dados!A2:A1000&gt;=TODAY(),Dados!A2:A1000&lt;TODAY()+1,Dados!B2:B1000&gt;0)),&quot;&quot;Sem dados&quot;&quot;)&quot;);37.5)" office:value-type="float" office:value="37.5" calcext:value-type="float">
            <text:p>37.5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endência</text:p>
          </table:table-cell>
          <table:table-cell table:style-name="ce6" table:formula="of:=IF(OR([.B6]=&quot;Sem dados&quot;;[.B7]=&quot;Sem dados&quot;);&quot;Sem dados&quot;;IF([.B6]&gt;[.B7]+5;&quot;Umidade aumentando&quot;;IF([.B6]&lt;[.B7]-5;&quot;Umidade diminuindo&quot;;&quot;Estável&quot;)))" office:value-type="string" office:string-value="Estável" calcext:value-type="string">
            <text:p>Estáve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iagnóstico simples</text:p>
          </table:table-cell>
          <table:table-cell table:style-name="ce6" table:formula="of:=IF([.B4]=&quot;Sem dados&quot;;&quot;Sem dados&quot;;IF([.B4]&lt;=20;&quot;Solo muito seco&quot;;IF([.B4]&lt;=45;&quot;Planta com sede&quot;;IF([.B4]&lt;=75;&quot;Umidade adequada&quot;;IF([.B4]&lt;=90;&quot;Solo muito úmido&quot;;&quot;Excesso crítico de água&quot;))))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 table:number-rows-repeated="985">
          <table:table-cell/>
          <table:table-cell table:style-name="ce5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shboard" table:style-name="ta3">
        <table:table-column table:style-name="co3" table:number-columns-repeated="6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1">
          <table:table-cell table:style-name="ce3" office:value-type="string" calcext:value-type="string">
            <text:p>Planta</text:p>
          </table:table-cell>
          <table:table-cell table:style-name="ce3" office:value-type="string" calcext:value-type="string">
            <text:p>Última leitura</text:p>
          </table:table-cell>
          <table:table-cell table:style-name="ce3" office:value-type="string" calcext:value-type="string">
            <text:p>Umidade atual</text:p>
          </table:table-cell>
          <table:table-cell table:style-name="ce3" office:value-type="string" calcext:value-type="string">
            <text:p>Estado atual</text:p>
          </table:table-cell>
          <table:table-cell table:style-name="ce3" office:value-type="string" calcext:value-type="string">
            <text:p>Média 24h</text:p>
          </table:table-cell>
          <table:table-cell table:style-name="ce3" office:value-type="string" calcext:value-type="string">
            <text:p>Tendência</text:p>
          </table:table-cell>
          <table:table-cell table:style-name="ce3" office:value-type="string" calcext:value-type="string">
            <text:p>Diagnóstico simples</text:p>
          </table:table-cell>
          <table:table-cell table:number-columns-repeated="1017"/>
        </table:table-row>
        <table:table-row table:style-name="ro1">
          <table:table-cell table:style-name="ce8" table:formula="of:=[$Resumo.B2]" office:value-type="string" office:string-value="Jibóia" calcext:value-type="string">
            <text:p>Jibóia</text:p>
          </table:table-cell>
          <table:table-cell table:style-name="ce9" table:formula="of:=[$Resumo.B3]" office:value-type="date" office:date-value="2026-06-08T10:59:59.712" calcext:value-type="date">
            <text:p>6/8/2026 11:00:00</text:p>
          </table:table-cell>
          <table:table-cell table:style-name="ce8" table:formula="of:=[$Resumo.B4]" office:value-type="float" office:value="28" calcext:value-type="float">
            <text:p>28</text:p>
          </table:table-cell>
          <table:table-cell table:style-name="ce8" table:formula="of:=[$Resumo.B5]" office:value-type="string" office:string-value="" calcext:value-type="error">
            <text:p>#N/A</text:p>
          </table:table-cell>
          <table:table-cell table:style-name="ce8" table:formula="of:=[$Resumo.B7]" office:value-type="float" office:value="37.5" calcext:value-type="float">
            <text:p>37.5</text:p>
          </table:table-cell>
          <table:table-cell table:style-name="ce8" table:formula="of:=[$Resumo.B14]" office:value-type="string" office:string-value="Estável" calcext:value-type="string">
            <text:p>Estável</text:p>
          </table:table-cell>
          <table:table-cell table:style-name="ce8" table:formula="of:=[$Resumo.B15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agnóstico" table:style-name="ta4">
        <table:table-column table:style-name="co3" table:number-columns-repeated="1024" table:default-cell-style-name="Default"/>
        <table:table-row table:style-name="ro1">
          <table:table-cell table:style-name="ce3" office:value-type="string" calcext:value-type="string">
            <text:p>Data/Hora</text:p>
          </table:table-cell>
          <table:table-cell table:style-name="ce3" office:value-type="string" calcext:value-type="string">
            <text:p>Planta</text:p>
          </table:table-cell>
          <table:table-cell table:style-name="ce3" office:value-type="string" calcext:value-type="string">
            <text:p>DiagnosticoIA</text:p>
          </table:table-cell>
          <table:table-cell table:number-columns-repeated="1021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agnósticoIA" table:style-name="ta5">
        <table:table-column table:style-name="co7" table:default-cell-style-name="Default"/>
        <table:table-column table:style-name="co3" table:number-columns-repeated="1023" table:default-cell-style-name="Default"/>
        <table:table-row table:style-name="ro1">
          <table:table-cell table:style-name="ce10" office:value-type="string" calcext:value-type="string">
            <text:p>Diagnóstico I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exto do último diagnóstico na célula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dos" style:display-name="PageStyle_Dad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mo" style:display-name="PageStyle_Resum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gnóstico" style:display-name="PageStyle_Diagnósti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gnósticoIA" style:display-name="PageStyle_DiagnósticoI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72" meta:object-count="0"/>
    <meta:generator>LibreOfficeDev/6.0.5.2$Linux_X86_64 LibreOffice_project/</meta:generator>
  </office:meta>
</office:document-meta>
</file>